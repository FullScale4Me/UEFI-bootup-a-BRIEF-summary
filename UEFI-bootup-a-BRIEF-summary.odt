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>
      <style:text-properties officeooo:paragraph-rsid="00048260"/>
    </style:style>
    <style:style style:name="P3" style:family="paragraph" style:parent-style-name="Standard">
      <style:text-properties fo:font-size="10pt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rsid="00129770" officeooo:paragraph-rsid="0013a858" style:font-size-asian="10pt" style:font-size-complex="10pt"/>
    </style:style>
    <style:style style:name="P6" style:family="paragraph" style:parent-style-name="Standard">
      <style:paragraph-properties fo:text-align="right" style:justify-single-word="false"/>
      <style:text-properties fo:font-size="10pt" style:font-size-asian="10pt" style:font-size-complex="10pt"/>
    </style:style>
    <style:style style:name="P7" style:family="paragraph" style:parent-style-name="Standard" style:list-style-name="L2">
      <style:text-properties officeooo:paragraph-rsid="0013a858"/>
    </style:style>
    <style:style style:name="P8" style:family="paragraph" style:parent-style-name="Standard" style:list-style-name="L3"/>
    <style:style style:name="P9" style:family="paragraph" style:parent-style-name="Standard" style:list-style-name="L4">
      <style:text-properties officeooo:paragraph-rsid="00152801"/>
    </style:style>
    <style:style style:name="P10" style:family="paragraph" style:parent-style-name="Standard">
      <style:text-properties fo:font-size="10pt" officeooo:paragraph-rsid="00152801" style:font-size-asian="8.75pt" style:font-size-complex="10pt"/>
    </style:style>
    <style:style style:name="P11" style:family="paragraph" style:parent-style-name="Standard">
      <style:text-properties fo:font-size="10pt" officeooo:paragraph-rsid="00048260" style:font-size-asian="8.75pt" style:font-size-complex="10pt"/>
    </style:style>
    <style:style style:name="P12" style:family="paragraph" style:parent-style-name="Standard" style:list-style-name="L4">
      <style:text-properties officeooo:paragraph-rsid="00048260"/>
    </style:style>
    <style:style style:name="P13" style:family="paragraph" style:parent-style-name="Standard" style:list-style-name="L5">
      <style:text-properties officeooo:paragraph-rsid="00159b7b"/>
    </style:style>
    <style:style style:name="P14" style:family="paragraph" style:parent-style-name="Standard">
      <style:text-properties officeooo:paragraph-rsid="00159b7b"/>
    </style:style>
    <style:style style:name="P15" style:family="paragraph" style:parent-style-name="Standard">
      <style:text-properties officeooo:paragraph-rsid="0005e27f"/>
    </style:style>
    <style:style style:name="P16" style:family="paragraph" style:parent-style-name="Standard">
      <style:paragraph-properties fo:margin-left="0in" fo:text-indent="0in" style:auto-text-indent="false"/>
      <style:text-properties officeooo:paragraph-rsid="001858f7"/>
    </style:style>
    <style:style style:name="P17" style:family="paragraph" style:parent-style-name="Standard">
      <style:paragraph-properties fo:margin-left="0in" fo:text-indent="0in" style:auto-text-indent="false"/>
      <style:text-properties fo:font-size="6pt" officeooo:paragraph-rsid="001858f7" style:font-size-asian="5.25pt" style:font-size-complex="6pt"/>
    </style:style>
    <style:style style:name="P18" style:family="paragraph" style:parent-style-name="Standard">
      <style:paragraph-properties fo:margin-top="0.0398in" fo:margin-bottom="0.0398in" style:contextual-spacing="false"/>
      <style:text-properties officeooo:paragraph-rsid="00048260"/>
    </style:style>
    <style:style style:name="P19" style:family="paragraph" style:parent-style-name="Standard">
      <style:text-properties officeooo:paragraph-rsid="000a4cd6"/>
    </style:style>
    <style:style style:name="P20" style:family="paragraph" style:parent-style-name="Heading_20_3">
      <style:paragraph-properties fo:margin-top="0in" fo:margin-bottom="0in" style:contextual-spacing="false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text-properties officeooo:paragraph-rsid="00172d20"/>
    </style:style>
    <style:style style:name="P23" style:family="paragraph" style:parent-style-name="Standard">
      <style:text-properties fo:font-size="6pt" officeooo:rsid="00172d20" officeooo:paragraph-rsid="00172d20" style:font-size-asian="5.25pt" style:font-size-complex="6pt"/>
    </style:style>
    <style:style style:name="P24" style:family="paragraph" style:parent-style-name="Standard">
      <style:text-properties officeooo:rsid="00172d20" officeooo:paragraph-rsid="00172d20"/>
    </style:style>
    <style:style style:name="P25" style:family="paragraph" style:parent-style-name="Standard">
      <style:text-properties officeooo:rsid="00129770" officeooo:paragraph-rsid="00129770"/>
    </style:style>
    <style:style style:name="P26" style:family="paragraph" style:parent-style-name="Standard">
      <style:paragraph-properties fo:text-align="justify" style:justify-single-word="false"/>
      <style:text-properties officeooo:rsid="0013a858" officeooo:paragraph-rsid="0013a858"/>
    </style:style>
    <style:style style:name="T1" style:family="text">
      <style:text-properties officeooo:rsid="00046ac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0e7dc"/>
    </style:style>
    <style:style style:name="T4" style:family="text">
      <style:text-properties officeooo:rsid="001934d2"/>
    </style:style>
    <style:style style:name="T5" style:family="text">
      <style:text-properties officeooo:rsid="00048260"/>
    </style:style>
    <style:style style:name="T6" style:family="text">
      <style:text-properties officeooo:rsid="001a1bdd"/>
    </style:style>
    <style:style style:name="T7" style:family="text">
      <style:text-properties officeooo:rsid="001b6f68"/>
    </style:style>
    <style:style style:name="T8" style:family="text">
      <style:text-properties officeooo:rsid="0013a858"/>
    </style:style>
    <style:style style:name="T9" style:family="text">
      <style:text-properties officeooo:rsid="001f312e"/>
    </style:style>
    <style:style style:name="T10" style:family="text">
      <style:text-properties officeooo:rsid="0005e27f"/>
    </style:style>
    <style:style style:name="T11" style:family="text">
      <style:text-properties officeooo:rsid="00152801"/>
    </style:style>
    <style:style style:name="T12" style:family="text">
      <style:text-properties officeooo:rsid="001c973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0e7dc" style:font-style-asian="italic" style:font-style-complex="italic"/>
    </style:style>
    <style:style style:name="T15" style:family="text">
      <style:text-properties fo:font-style="italic" officeooo:rsid="001f312e" style:font-style-asian="italic" style:font-style-complex="italic"/>
    </style:style>
    <style:style style:name="T16" style:family="text">
      <style:text-properties officeooo:rsid="00159b7b"/>
    </style:style>
    <style:style style:name="T17" style:family="text">
      <style:text-properties officeooo:rsid="001a8684"/>
    </style:style>
    <style:style style:name="T18" style:family="text">
      <style:text-properties fo:font-style="italic" officeooo:rsid="00159b7b" style:font-style-asian="italic" style:font-style-complex="italic"/>
    </style:style>
    <style:style style:name="T19" style:family="text">
      <style:text-properties fo:font-weight="bold" officeooo:rsid="001858f7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e7dc" style:font-weight-asian="bold" style:font-weight-complex="bold"/>
    </style:style>
    <style:style style:name="T22" style:family="text">
      <style:text-properties officeooo:rsid="000ded39"/>
    </style:style>
    <style:style style:name="T23" style:family="text">
      <style:text-properties officeooo:rsid="00129770"/>
    </style:style>
    <style:style style:name="T24" style:family="text">
      <style:text-properties fo:font-weight="bold" officeooo:rsid="00172d20" style:font-weight-asian="bold" style:font-weight-complex="bold"/>
    </style:style>
    <style:style style:name="T25" style:family="text">
      <style:text-properties officeooo:rsid="00172d20"/>
    </style:style>
    <style:style style:name="T26" style:family="text">
      <style:text-properties officeooo:rsid="001e1916"/>
    </style:style>
    <style:style style:name="T27" style:family="text">
      <style:text-properties officeooo:rsid="001785ac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EFI bootup: <text:span text:style-name="T1">a</text:span> <text:span text:style-name="T2">BRIEF</text:span> summary</text:h>
      <text:p text:style-name="Standard"/>
      <text:p text:style-name="Standard">The UEFI firmware contains its own <text:span text:style-name="T3">B</text:span>oot <text:span text:style-name="T3">M</text:span>anager <text:span text:style-name="T1">that operates independent of </text:span><text:span text:style-name="T3">h</text:span><text:span text:style-name="T1">ard </text:span><text:span text:style-name="T4">d</text:span><text:span text:style-name="T1">isk Boot Order used by BIOS aka Legacy booting. After the PC </text:span><text:span text:style-name="T5">is </text:span><text:span text:style-name="T1">power</text:span><text:span text:style-name="T5">ed</text:span><text:span text:style-name="T1"> on </text:span><text:span text:style-name="T6">in 'UEFI mode' </text:span><text:span text:style-name="T1">the following sequence occurs:</text:span></text:p>
      <text:p text:style-name="Standard"/>
      <text:list text:style-name="L1">
        <text:list-item>
          <text:p text:style-name="P2">The UEFI-based platform to determine<text:span text:style-name="T5">s</text:span> the boot disk <text:span text:style-name="T5">by </text:span>read<text:span text:style-name="T5">ing</text:span> the first record in the NV<text:span text:style-name="T5">RAM</text:span>. <text:span text:style-name="T5">An e</text:span>xample:</text:p>
        </text:list-item>
      </text:list>
      <text:p text:style-name="P3"/>
      <text:p text:style-name="P4">Boot0003* MX Linux HD(2,GPT,9c01d5df-3bd4-a946-9be0-b11db920d5de,0x800,0x1b800)/File(\EFI\MX\shimx64.efi)<text:note text:id="ftn1" text:note-class="footnote"><text:note-citation>1</text:note-citation><text:note-body><text:p text:style-name="P5"><text:s text:c="5"/>Ouput excerpt of efibootmger -v</text:p></text:note-body></text:note></text:p>
      <text:p text:style-name="P6"/>
      <text:list text:style-name="L2">
        <text:list-item>
          <text:p text:style-name="P7"><text:span text:style-name="T7">Based on the above t</text:span>he firmware reads th<text:span text:style-name="T8">e</text:span> <text:span text:style-name="T9">GPT </text:span>Partition Table <text:span text:style-name="T8">of </text:span>disk HD2 <text:span text:style-name="T8">then locates </text:span>and mounts the EFI. The E<text:span text:style-name="T9">FI</text:span> contains the EFI bootloader <text:span text:style-name="T10">*</text:span>.efi <text:span text:style-name="T10">files </text:span>that are stored in <text:span text:style-name="T11">vendor specific </text:span>directories. <text:span text:style-name="T12">(example below)</text:span></text:p>
        </text:list-item>
      </text:list>
      <text:p text:style-name="Standard"/>
      <text:list text:style-name="L3">
        <text:list-item>
          <text:p text:style-name="P8">The firmware <text:span text:style-name="T11">then </text:span>traverses the disk, starting <text:span text:style-name="T11">from</text:span> EFI to the MX folder <text:span text:style-name="T11">(file path above)</text:span>.</text:p>
        </text:list-item>
      </text:list>
      <text:p text:style-name="Standard"/>
      <text:list text:style-name="L4">
        <text:list-item>
          <text:p text:style-name="P9">The firmware reads shimx64.efi into memory and runs it <text:span text:style-name="T11">which then runs </text:span><text:span text:style-name="T10">\MX25\</text:span><text:span text:style-name="T11">grubx64.efi</text:span></text:p>
        </text:list-item>
      </text:list>
      <text:p text:style-name="P10"/>
      <text:list text:continue-numbering="true" text:style-name="L4">
        <text:list-header>
          <text:p text:style-name="P9"><text:span text:style-name="T13">This is where the Secure Boot 'shuffle' </text:span><text:span text:style-name="T14">(on vs off) </text:span><text:span text:style-name="T13">occurs. </text:span><text:span text:style-name="T15">D</text:span><text:span text:style-name="T13">etails omitted for brevity</text:span>.<text:note text:id="ftn2" text:note-class="footnote"><text:note-citation>2</text:note-citation><text:note-body><text:p text:style-name="Footnote">https://github.com/rhboot/shim</text:p></text:note-body></text:note></text:p>
        </text:list-header>
      </text:list>
      <text:p text:style-name="P11"/>
      <text:list text:continue-numbering="true" text:style-name="L4">
        <text:list-item>
          <text:p text:style-name="P12"><text:span text:style-name="T11">When run, </text:span>grubx64.efi loads <text:span text:style-name="T11">i</text:span><text:span text:style-name="T10">t</text:span><text:span text:style-name="T11">s configuration</text:span><text:span text:style-name="T10"> </text:span>files: grub.cfg <text:span text:style-name="T11">and</text:span> BOOTX64.CSV.</text:p>
        </text:list-item>
      </text:list>
      <text:p text:style-name="Standard"/>
      <text:list text:style-name="L5">
        <text:list-item>
          <text:p text:style-name="P13"><text:span text:style-name="T16">T</text:span>he firmware now know<text:span text:style-name="T16">s</text:span> <text:span text:style-name="T16">the location of</text:span> the <text:span text:style-name="T16">final </text:span>/boot <text:span text:style-name="T16">files. i</text:span>nitramfs image <text:span text:style-name="T16">and</text:span> vmzlinux <text:span text:style-name="T16">(</text:span>kernel)<text:span text:style-name="T16">.</text:span></text:p>
        </text:list-item>
      </text:list>
      <text:p text:style-name="P14"/>
      <text:list text:continue-numbering="true" text:style-name="L5">
        <text:list-item>
          <text:p text:style-name="P13"><text:span text:style-name="T16">The firmware</text:span> load<text:span text:style-name="T16">s</text:span> the<text:span text:style-name="T17">se files</text:span> into memory <text:span text:style-name="T16">and shift control to the </text:span><text:span text:style-name="T17">kernel</text:span>. <text:span text:style-name="T6">K</text:span><text:span text:style-name="T18">ernel loading d</text:span><text:span text:style-name="T13">etails omitted for brevity.</text:span></text:p>
        </text:list-item>
      </text:list>
      <text:p text:style-name="P15"/>
      <text:p text:style-name="P16"><text:span text:style-name="T19">Some</text:span><text:span text:style-name="T20"> important point</text:span><text:span text:style-name="T19">s</text:span>: <text:span text:style-name="T5">The</text:span> /BOOT <text:span text:style-name="T10">above </text:span>and /boot <text:span text:style-name="T2">are</text:span> different. The /BOOT is optional support for booting from removable media and usually has one file BOOTX64.EFI. </text:p>
      <text:p text:style-name="P17"/>
      <text:p text:style-name="P16"><text:span text:style-name="T10">Normally /boot is a folder in / </text:span><text:span text:style-name="T3">(</text:span><text:span text:style-name="T10">root</text:span><text:span text:style-name="T3">)</text:span><text:span text:style-name="T10"> but i</text:span>n an encrypted <text:span text:style-name="T16">installation</text:span> the /boot is <text:span text:style-name="T6">in a</text:span>separate partition.</text:p>
      <text:p text:style-name="P18"/>
      <text:p text:style-name="P19"><draw:frame draw:style-name="fr1" draw:name="Frame1" text:anchor-type="as-char" draw:z-index="0"><draw:text-box fo:min-height="0.0161in" fo:min-width="0.0161in"><text:h text:style-name="P20" text:outline-level="3"><text:span text:style-name="T21">An </text:span><text:span text:style-name="T20">ESP example</text:span>:</text:h></draw:text-box></draw:frame><text:tab/>/EFI</text:p>
      <text:p text:style-name="P19"><text:tab/><text:tab/><text:tab/><text:tab/><text:tab/>/BOOT</text:p>
      <text:p text:style-name="P19"><text:tab/><text:tab/><text:tab/><text:tab/><text:tab/>/Microsoft</text:p>
      <text:p text:style-name="P19"><text:tab/><text:tab/><text:tab/><text:tab/><text:tab/>/MX</text:p>
      <text:p text:style-name="P19"><text:tab/><text:tab/><text:tab/><text:tab/><text:tab/>/MX25</text:p>
      <text:p text:style-name="P19"/>
      <text:h text:style-name="Heading_20_3" text:outline-level="3">Links – <text:span text:style-name="T22">in order of increasing complexity</text:span></text:h>
      <text:p text:style-name="P21"/>
      <text:p text:style-name="Standard">How Does Linux Boot Process Work? <text:a xlink:type="simple" xlink:href="https://www.youtube.com/watch?v=XpFsMB6FoOs" text:style-name="Internet_20_link" text:visited-style-name="Visited_20_Internet_20_Link">https://www.youtube.com/watch?v=XpFsMB6FoOs</text:a></text:p>
      <text:p text:style-name="P21"/>
      <text:p text:style-name="Standard">The Linux Boot Process (Linux+ Objective 1.1.2) <text:a xlink:type="simple" xlink:href="https://www.youtube.com/watch?v=esH6GUjVa8Y" text:style-name="Internet_20_link" text:visited-style-name="Visited_20_Internet_20_Link">https://www.youtube.com/watch?v=esH6GUjVa8Y</text:a></text:p>
      <text:p text:style-name="P21"/>
      <text:p text:style-name="Standard"><text:a xlink:type="simple" xlink:href="https://www.nsa.gov/portals/75/documents/what-we-do/cybersecurity/professional-resources/csi-boot-security-modes-and-recommendations.pdf" text:style-name="Internet_20_link" text:visited-style-name="Visited_20_Internet_20_Link"><text:span text:style-name="T23">Boot security modes and recommendations</text:span></text:a><text:span text:style-name="T23"> </text:span><text:span text:style-name="T9">PDF </text:span><text:span text:style-name="T23">nsa.gov</text:span></text:p>
      <text:p text:style-name="Standard"/>
      <text:p text:style-name="Standard"/>
      <text:p text:style-name="P22"><text:span text:style-name="T24">Feedback expected and welcomed! </text:span><text:span text:style-name="T25">Spelling &amp; grammar: yes! Out of sequence or major point(s) missing: yes!</text:span></text:p>
      <text:p text:style-name="P23"/>
      <text:p text:style-name="P24">My intent was a <text:span text:style-name="T2">VERY</text:span> brief <text:span text:style-name="T26">writeup </text:span>that even a new <text:span text:style-name="T27">to Linux </text:span>user could dige<text:span text:style-name="T27">s</text:span>t and achieve &gt;90% comprehension in <text:span text:style-name="T20">ONE</text:span> read. There a<text:span text:style-name="T17">re</text:span> plenty of comprehensive writings on this topic to be found on the web, Google has almost all of them :-)</text:p>
      <text:p text:style-name="P25"/>
      <text:p text:style-name="P26"><text:span text:style-name="T20">Created by</text:span> FullScale4Me on October 29, 2025<text:tab/><text:tab/><text:tab/><text:tab/><text:tab/> <text:s text:c="2"/><text:span text:style-name="T20">Last updated</text:span> October 30,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O'Toole</meta:initial-creator>
    <meta:creation-date>2025-10-30T00:46:39.535753350</meta:creation-date>
    <dc:date>2026-06-16T22:00:22.518664382</dc:date>
    <dc:creator>Michael O'Toole</dc:creator>
    <meta:editing-duration>PT16H45M1S</meta:editing-duration>
    <meta:editing-cycles>26</meta:editing-cycles>
    <meta:generator>LibreOffice/26.2.4.2$Linux_X86_64 LibreOffice_project/0229ac93fcf0d7cbc6376066c6f35021cef002dc</meta:generator>
    <meta:printed-by>Mike O'Toole</meta:printed-by>
    <meta:print-date>2025-10-30T16:39:40.619391414</meta:print-date>
    <meta:document-statistic meta:table-count="0" meta:image-count="0" meta:object-count="0" meta:page-count="1" meta:paragraph-count="28" meta:word-count="355" meta:character-count="2321" meta:non-whitespace-character-count="1966"/>
  </office:meta>
</office:document-meta>
</file>